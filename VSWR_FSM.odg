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cm" draw:marker-start-width="0.35cm" draw:marker-end="Arrowheads_20_5" draw:marker-end-width="0.45cm" draw:fill="none" draw:textarea-horizontal-align="justify" draw:textarea-vertical-align="middle" draw:auto-grow-height="tru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="Arrowheads_20_5" draw:marker-end-width="0.45cm" draw:fill="none" draw:textarea-horizontal-align="justify" draw:textarea-vertical-align="middle" draw:auto-grow-height="tru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cm" draw:marker-start-width="0.35cm" draw:marker-end="Arrowheads_20_5" draw:marker-end-width="0.45cm" draw:fill="none" draw:textarea-horizontal-align="justify" draw:textarea-vertical-align="middle" draw:auto-grow-height="tru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heads_20_5" draw:marker-end-width="0.4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8pt" style:letter-kerning="true" style:font-name-asian="Microsoft YaHei" style:font-size-asian="18pt" style:font-name-complex="Arial1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Arial1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Arial1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.509cm" svg:x="3.903cm" svg:y="10.871cm">
          <text:p text:style-name="P1"><text:span text:style-name="T1">Functional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5cm" svg:height="2.507cm" svg:x="7.25cm" svg:y="3.871cm">
          <text:p text:style-name="P3"><text:span text:style-name="T1">HW Safe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cm" svg:height="2.509cm" svg:x="12.5cm" svg:y="9.371cm">
          <text:p text:style-name="P1"><text:span text:style-name="T1">Recover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35cm" svg:y1="11.238cm" svg:x2="7.25cm" svg:y2="5.125cm" draw:start-shape="id1" draw:start-glue-point="5" draw:end-shape="id2" draw:end-glue-point="6" svg:d="M4635 11238c0-4076 871-6113 2615-6113" svg:viewBox="0 0 2616 6114">
          <text:p/>
        </draw:connector>
        <draw:connector draw:style-name="gr4" draw:text-style-name="P5" draw:layer="layout" draw:type="curve" svg:x1="12.25cm" svg:y1="5.125cm" svg:x2="15cm" svg:y2="9.371cm" draw:start-shape="id2" draw:start-glue-point="10" draw:end-shape="id3" draw:end-glue-point="4" svg:d="M12250 5125c1834 0 2750 1415 2750 4246" svg:viewBox="0 0 2751 4247">
          <text:p/>
        </draw:connector>
        <draw:connector draw:style-name="gr4" draw:text-style-name="P5" draw:layer="layout" draw:type="curve" svg:x1="15cm" svg:y1="11.88cm" svg:x2="6.403cm" svg:y2="13.38cm" draw:start-shape="id3" draw:start-glue-point="8" draw:end-shape="id1" draw:end-glue-point="8" svg:d="M15000 11880c0 3075-8597 2325-8597 1500" svg:viewBox="0 0 8598 2227">
          <text:p/>
        </draw:connector>
        <draw:connector draw:style-name="gr4" draw:text-style-name="P5" draw:layer="layout" draw:type="curve" draw:line-skew="-0.618cm -0.714cm" svg:x1="4.635cm" svg:y1="13.013cm" svg:x2="3.903cm" svg:y2="12.126cm" draw:start-shape="id1" draw:start-glue-point="7" draw:end-shape="id1" draw:end-glue-point="6" svg:d="M4635 13013c0 448-998 374-1655 40s-973-927 923-927" svg:viewBox="0 0 2166 1201">
          <text:p/>
        </draw:connector>
        <draw:connector draw:style-name="gr4" draw:text-style-name="P5" draw:layer="layout" draw:type="curve" draw:line-skew="-0.63cm" svg:x1="9.75cm" svg:y1="3.871cm" svg:x2="11.518cm" svg:y2="4.238cm" draw:start-shape="id2" draw:start-glue-point="4" draw:end-shape="id2" draw:end-glue-point="11" svg:d="M9750 3871c0-1771 1768-1955 1768 367" svg:viewBox="0 0 1769 1720">
          <text:p/>
        </draw:connector>
        <draw:connector draw:style-name="gr4" draw:text-style-name="P5" draw:layer="layout" draw:type="curve" svg:x1="12.5cm" svg:y1="10.626cm" svg:x2="9.75cm" svg:y2="6.378cm" draw:start-shape="id3" draw:start-glue-point="6" draw:end-shape="id2" draw:end-glue-point="8" svg:d="M12500 10626c-1834 0-2750-1416-2750-4248" svg:viewBox="0 0 2751 4249">
          <text:p/>
        </draw:connector>
        <draw:frame draw:style-name="gr5" draw:text-style-name="P6" draw:layer="layout" svg:width="4cm" svg:height="1.039cm" svg:x="14.35cm" svg:y="5.511cm">
          <draw:text-box>
            <text:p/>
            <text:p><text:span text:style-name="T2">SW-LATCH-CLR</text:span></text:p>
          </draw:text-box>
        </draw:frame>
        <draw:frame draw:style-name="gr5" draw:text-style-name="P6" draw:layer="layout" svg:width="4cm" svg:height="1.039cm" svg:x="7.2cm" svg:y="8.3cm">
          <draw:text-box>
            <text:p>____________</text:p>
            <text:p><text:span text:style-name="T2">VSWR-STATUS</text:span></text:p>
          </draw:text-box>
        </draw:frame>
        <draw:frame draw:style-name="gr5" draw:text-style-name="P6" draw:layer="layout" svg:width="4cm" svg:height="1.039cm" svg:x="11cm" svg:y="13.961cm">
          <draw:text-box>
            <text:p/>
            <text:p><text:span text:style-name="T2">VSWR-STATUS</text:span></text:p>
          </draw:text-box>
        </draw:frame>
        <draw:frame draw:style-name="gr5" draw:text-style-name="P6" draw:layer="layout" svg:width="4cm" svg:height="1.039cm" svg:x="1.5cm" svg:y="13cm">
          <draw:text-box>
            <text:p/>
            <text:p><text:span text:style-name="T2">VSWR-STATUS</text:span></text:p>
          </draw:text-box>
        </draw:frame>
        <draw:frame draw:style-name="gr5" draw:text-style-name="P6" draw:layer="layout" svg:width="4cm" svg:height="1.039cm" svg:x="1.95cm" svg:y="6.85cm">
          <draw:text-box>
            <text:p>____________</text:p>
            <text:p><text:span text:style-name="T2">VSWR-STATUS</text:span></text:p>
          </draw:text-box>
        </draw:frame>
        <draw:frame draw:style-name="gr5" draw:text-style-name="P6" draw:layer="layout" svg:width="4cm" svg:height="1.039cm" svg:x="11.25cm" svg:y="1.961cm">
          <draw:text-box>
            <text:p>______________</text:p>
            <text:p><text:span text:style-name="T2">SW-LATCH-CL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Yu Gothic Medium" style:font-family-complex="'Yu Gothic Medium'" style:font-style-name-complex="Regular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8T00:27:57.357511000</meta:creation-date>
    <dc:date>2026-05-28T01:14:43.847126700</dc:date>
    <meta:editing-duration>PT6M54S</meta:editing-duration>
    <meta:editing-cycles>4</meta:editing-cycles>
    <meta:generator>LibreOffice/25.8.6.1$Windows_X86_64 LibreOffice_project/85297ec6e49ec4e6faaa6f11880d49294fc70e60</meta:generator>
    <meta:document-statistic meta:object-count="15"/>
  </office:meta>
</office:document-meta>
</file>